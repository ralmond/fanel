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ubj</text:p>
          </table:table-cell>
          <table:table-cell office:value-type="string" calcext:value-type="string">
            <text:p>occ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45" calcext:value-type="float">
            <text:p>0.4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.05" calcext:value-type="float">
            <text:p>0.0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.15" calcext:value-type="float">
            <text:p>0.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.09" calcext:value-type="float">
            <text:p>0.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Sheet1.C1:Sheet1.C6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ussell Almond</meta:initial-creator>
    <meta:creation-date>2026-04-22T19:30:14.884965997</meta:creation-date>
    <dc:date>2026-04-22T20:33:13.127581461</dc:date>
    <dc:creator>Russell Almond</dc:creator>
    <meta:editing-duration>PT18M34S</meta:editing-duration>
    <meta:editing-cycles>2</meta:editing-cycles>
    <meta:generator>LibreOffice/24.2.7.2$Linux_X86_64 LibreOffice_project/420$Build-2</meta:generator>
    <meta:document-statistic meta:table-count="1" meta:cell-count="641" meta:object-count="0"/>
  </office:meta>
</office:document-meta>
</file>